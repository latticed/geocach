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801cm" table:align="left"/>
    </style:style>
    <style:style style:name="Tabelle1.A" style:family="table-column">
      <style:table-column-properties style:column-width="1.605cm"/>
    </style:style>
    <style:style style:name="Tabelle1.B" style:family="table-column">
      <style:table-column-properties style:column-width="16.196cm"/>
    </style:style>
    <style:style style:name="Tabelle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1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1.A4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1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le2" style:family="table">
      <style:table-properties style:width="17.801cm" table:align="left"/>
    </style:style>
    <style:style style:name="Tabelle2.A" style:family="table-column">
      <style:table-column-properties style:column-width="1.704cm"/>
    </style:style>
    <style:style style:name="Tabelle2.B" style:family="table-column">
      <style:table-column-properties style:column-width="16.097cm"/>
    </style:style>
    <style:style style:name="Tabelle2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le2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le2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le2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le2.A5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le2.B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Fließtext.lead">
      <style:text-properties fo:font-weight="bold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weitägige Geocaching-Aktion (7.–9. Klasse)</text:p>
      <text:p text:style-name="P2">2 Gruppen · täglich 9:00–12:00 Uhr · Navigation: Mix (Smartphone-GPS + Karte/Hinweise)</text:p>
      <text:p text:style-name="Text_20_body">Grundidee (Tausch-Prinzip): Beide Gruppen erstellen und verstecken am Tag 1 eigene Caches. Am Tag 2 werden die Hinweise getauscht — jede Gruppe sucht die Caches der anderen.</text:p>
      <text:h text:style-name="Heading_20_2" text:outline-level="2">Vorbereitung</text:h>
      <text:h text:style-name="Heading_20_3" text:outline-level="3">~1 Woche vorher</text:h>
      <text:list text:style-name="L1">
        <text:list-item>
          <text:p text:style-name="P3">☐ Gelände auswählen &amp; festlegen — 2 abgegrenzte Bereiche, je einer pro Gruppe </text:p>
        </text:list-item>
        <text:list-item>
          <text:p text:style-name="P3">☐ Gelände selbst abgehen (Sicherheit, Verstecke, Handyempfang/GPS-Genauigkeit) </text:p>
        </text:list-item>
        <text:list-item>
          <text:p text:style-name="P3">☐ Betreuer einteilen (mind. 1 pro Gruppe + 1 Springer) </text:p>
        </text:list-item>
        <text:list-item>
          <text:p text:style-name="P3">☐ Eltern-/Schulinfo: wetterfeste Kleidung, festes Schuhwerk, ggf. eigenes Handy </text:p>
        </text:list-item>
        <text:list-item>
          <text:p text:style-name="P4">☐ Geocaching-App installieren &amp; testen (c:geo o. ä.) </text:p>
        </text:list-item>
      </text:list>
      <text:h text:style-name="Heading_20_3" text:outline-level="3">~2 Tage vorher — Material</text:h>
      <text:list text:style-name="L2">
        <text:list-item>
          <text:p text:style-name="P5">☐ Cache-Behälter (wasserdicht): Lock&amp;Lock, PETlinge, Filmdosen — ca. 6–10 pro Gruppe </text:p>
        </text:list-item>
        <text:list-item>
          <text:p text:style-name="P5">☐ Logbücher (Papierstreifen) + wasserfeste Stifte/Bleistifte </text:p>
        </text:list-item>
        <text:list-item>
          <text:p text:style-name="P5">☐ Tauschgegenstände: Spielzeug, Sticker, Anstecker, Murmeln </text:p>
        </text:list-item>
        <text:list-item>
          <text:p text:style-name="P5">☐ Tarnmaterial: Tarnband, Schnur, ggf. Magnete </text:p>
        </text:list-item>
        <text:list-item>
          <text:p text:style-name="P5">☐ Geländekarte mehrfach ausdrucken (wasserfest/Folie) </text:p>
        </text:list-item>
        <text:list-item>
          <text:p text:style-name="P5">☐ Klemmbretter, Stifte, Cache-Steckbrief-Vordrucke </text:p>
        </text:list-item>
        <text:list-item>
          <text:p text:style-name="P6">☐ Powerbanks + Ladekabel · Erste-Hilfe-Set · Müllbeutel · Wasser/Verpflegung </text:p>
        </text:list-item>
      </text:list>
      <text:h text:style-name="Heading_20_2" text:outline-level="2">Tag 1 — Erstellen &amp; Ausbringen (9:00–12:00)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Zeit</text:p>
          </table:table-cell>
          <table:table-cell table:style-name="Tabelle1.B1" office:value-type="string">
            <text:p text:style-name="Table_20_Heading">Programm</text:p>
          </table:table-cell>
        </table:table-row>
        <table:table-row>
          <table:table-cell table:style-name="Tabelle1.A2" office:value-type="string">
            <text:p text:style-name="Table_20_Contents">9:00–10:00</text:p>
          </table:table-cell>
          <table:table-cell table:style-name="Tabelle1.B2" office:value-type="string">
            <text:p text:style-name="Table_20_Contents"><text:span text:style-name="T1">Planung &amp; Einführung:</text:span> Was ist Geocaching? Regeln (Müll mitnehmen, unauffällig „muggeln"), Sicherheit, App-/GPS-Bedienung üben (Test-Cache). Gruppen einteilen, Bereiche zuweisen.</text:p>
          </table:table-cell>
        </table:table-row>
        <table:table-row>
          <table:table-cell table:style-name="Tabelle1.A2" office:value-type="string">
            <text:p text:style-name="Table_20_Contents">10:00–11:00</text:p>
          </table:table-cell>
          <table:table-cell table:style-name="Tabelle1.B2" office:value-type="string">
            <text:p text:style-name="Table_20_Contents"><text:span text:style-name="T1">Caches erstellen:</text:span> Behälter befüllen (Logbuch + Tauschgegenstand), Steckbrief ausfüllen, Schwierigkeit &amp; Tarnung festlegen.</text:p>
          </table:table-cell>
        </table:table-row>
        <table:table-row>
          <table:table-cell table:style-name="Tabelle1.A4" office:value-type="string">
            <text:p text:style-name="Table_20_Contents">11:00–12:00</text:p>
          </table:table-cell>
          <table:table-cell table:style-name="Tabelle1.B4" office:value-type="string">
            <text:p text:style-name="Table_20_Contents"><text:span text:style-name="T1">Caches ausbringen:</text:span> Jede Gruppe versteckt im eigenen Bereich. Koordinaten per App erfassen <text:span text:style-name="T1">und</text:span> Hinweis/Karten-Markierung notieren. Steckbriefe einsammeln.</text:p>
          </table:table-cell>
        </table:table-row>
      </table:table>
      <text:p text:style-name="Quotations">Betreuer prüfen jedes Versteck auf Auffindbarkeit &amp; Sicherheit, bevor Tag 1 endet.</text:p>
      <text:h text:style-name="Heading_20_2" text:outline-level="2">Tag 2 — Tausch &amp; Suchen (9:00–12:00)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Zeit</text:p>
          </table:table-cell>
          <table:table-cell table:style-name="Tabelle2.B1" office:value-type="string">
            <text:p text:style-name="Table_20_Heading">Programm</text:p>
          </table:table-cell>
        </table:table-row>
        <table:table-row>
          <table:table-cell table:style-name="Tabelle2.A2" office:value-type="string">
            <text:p text:style-name="Table_20_Contents">9:00–9:15</text:p>
          </table:table-cell>
          <table:table-cell table:style-name="Tabelle2.B2" office:value-type="string">
            <text:p text:style-name="Table_20_Contents"><text:span text:style-name="T1">Briefing &amp; Tausch:</text:span> Gruppen erhalten die Hinweise der <text:span text:style-name="T2">anderen</text:span> Gruppe. Regeln: finden → Logbuch eintragen → gleichwertig tauschen → wie vorgefunden verstecken.</text:p>
          </table:table-cell>
        </table:table-row>
        <table:table-row>
          <table:table-cell table:style-name="Tabelle2.A2" office:value-type="string">
            <text:p text:style-name="Table_20_Contents">9:15–11:15</text:p>
          </table:table-cell>
          <table:table-cell table:style-name="Tabelle2.B2" office:value-type="string">
            <text:p text:style-name="Table_20_Contents"><text:span text:style-name="T1">Suchen:</text:span> A sucht Caches von B, B sucht von A. Betreuer begleiten, geben gestaffelte Tipps. Erst GPS/App, bei Problemen Karte/Hinweis.</text:p>
          </table:table-cell>
        </table:table-row>
        <table:table-row>
          <table:table-cell table:style-name="Tabelle2.A2" office:value-type="string">
            <text:p text:style-name="Table_20_Contents">11:15–11:45</text:p>
          </table:table-cell>
          <table:table-cell table:style-name="Tabelle2.B2" office:value-type="string">
            <text:p text:style-name="Table_20_Contents"><text:span text:style-name="T1">Sammeln &amp; Tauschen:</text:span> Caches einsammeln, Tauschaktion abschließen, Logbücher zusammentragen.</text:p>
          </table:table-cell>
        </table:table-row>
        <table:table-row>
          <table:table-cell table:style-name="Tabelle2.A5" office:value-type="string">
            <text:p text:style-name="Table_20_Contents">11:45–12:00</text:p>
          </table:table-cell>
          <table:table-cell table:style-name="Tabelle2.B5" office:value-type="string">
            <text:p text:style-name="Table_20_Contents"><text:span text:style-name="T1">Auswertung:</text:span> Alle gefunden? Schwerster/kreativster Cache? Müll mitnehmen, Material zurück.</text:p>
          </table:table-cell>
        </table:table-row>
      </table:table>
      <text:p text:style-name="Text_20_body"><text:span text:style-name="T1">Wertung (optional):</text:span> Punkte pro Fund + Kreativ-Punkt fürs beste eigene Versteck → Siegerteam.</text:p>
      <text:h text:style-name="Heading_20_2" text:outline-level="2">Schlechtwetter-Plan (Regen)</text:h>
      <text:h text:style-name="Heading_20_3" text:outline-level="3">Option A — Hausspiel (Indoor)</text:h>
      <text:list text:style-name="L3">
        <text:list-item>
          <text:p text:style-name="P8">Indoor-Schatzsuche / QR-Rallye im Gebäude statt GPS (siehe <text:span text:style-name="T2">Regenplan-Stationen</text:span>). </text:p>
        </text:list-item>
        <text:list-item>
          <text:p text:style-name="P9">Statt Koordinaten QR-Codes / Rätsel-Hinweise als Stationen-Kette; optional Escape-Element (Zahlenschloss-Box). </text:p>
        </text:list-item>
      </text:list>
      <text:h text:style-name="Heading_20_3" text:outline-level="3">Option B — Schnitzeljagd / Erkunden</text:h>
      <text:list text:style-name="L4">
        <text:list-item>
          <text:p text:style-name="P10">Klassische Schnitzeljagd Hinweis-zu-Hinweis (überdachte/kurze Strecke oder im Gebäude). </text:p>
        </text:list-item>
        <text:list-item>
          <text:p text:style-name="P11">Erkundungs-Aufgaben unterwegs (Fotos, Fragen zum Ort, Sammelaufgaben). </text:p>
        </text:list-item>
      </text:list>
      <text:h text:style-name="Heading_20_2" text:outline-level="2">Offene Punkte</text:h>
      <text:list text:style-name="L5">
        <text:list-item>
          <text:p text:style-name="P12">Konkretes Gelände &amp; Termine · Anzahl Betreuer · Budget · eigene Handys oder gestellte Geräte?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de" fo:country="D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/>
      <style:text-properties fo:color="#222222" loext:opacity="100%" style:font-name="DejaVu Sans" fo:font-family="'DejaVu Sans', Arial, sans-serif" fo:font-size="11pt" style:font-name-asian="DejaVu Sans" style:font-family-asian="'DejaVu Sans', Arial, sans-serif" style:font-size-asian="11pt" style:font-name-complex="DejaVu Sans" style:font-family-complex="'DejaVu Sans', Arial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left" style:justify-single-word="false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141cm" style:contextual-spacing="false" fo:padding-left="0cm" fo:padding-right="0cm" fo:padding-top="0cm" fo:padding-bottom="0.141cm" fo:border-left="none" fo:border-right="none" fo:border-top="none" fo:border-bottom="1.5pt solid #2e7d32"/>
      <style:text-properties fo:color="#1b5e20" loext:opacity="100%" fo:font-size="19pt" fo:font-weight="bold" style:font-size-asian="19pt" style:font-weight-asian="bold" style:font-size-complex="1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.564cm" fo:margin-right="0.564cm" fo:margin-top="0.564cm" fo:margin-bottom="0.141cm" style:contextual-spacing="false"/>
      <style:text-properties fo:color="#2e7d32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.353cm" fo:margin-right="0.353cm" fo:margin-top="0.353cm" fo:margin-bottom="0.106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282cm" fo:margin-right="0.282cm" fo:margin-top="0.282cm" fo:margin-bottom="0.282cm" style:contextual-spacing="false" fo:text-indent="0cm" style:auto-text-indent="false" fo:padding-left="0.353cm" fo:padding-right="0cm" fo:padding-top="0cm" fo:padding-bottom="0cm" fo:border-left="2.24pt solid #c8e6c9" fo:border-right="none" fo:border-top="none" fo:border-bottom="none"/>
      <style:text-properties fo:color="#444444" loext:opacity="100%"/>
    </style:style>
    <style:style style:name="Fließtext.lead" style:family="paragraph" style:parent-style-name="Text_20_body">
      <style:text-properties fo:color="#555555" loext:opacity="100%"/>
    </style:style>
    <style:style style:name="Table_20_Heading" style:display-name="Table Heading" style:family="paragraph" style:parent-style-name="Table_20_Contents" style:class="extra">
      <style:paragraph-properties fo:text-align="lef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Geocaching-Aktion – Plan</dc:title>
    <meta:document-statistic meta:table-count="2" meta:image-count="0" meta:object-count="0" meta:page-count="1" meta:paragraph-count="49" meta:word-count="391" meta:character-count="2970" meta:non-whitespace-character-count="2632"/>
    <meta:generator>LibreOffice/26.2.4.2$Linux_X86_64 LibreOffice_project/df4f15f06f7b375c1d16aa35fba92d50b262cd01</meta:generator>
    <meta:user-defined meta:name=""/>
  </office:meta>
</office:document-meta>
</file>