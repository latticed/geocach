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.801cm" table:align="left"/>
    </style:style>
    <style:style style:name="Tabelle1.A" style:family="table-column">
      <style:table-column-properties style:column-width="1.279cm"/>
    </style:style>
    <style:style style:name="Tabelle1.B" style:family="table-column">
      <style:table-column-properties style:column-width="16.522cm"/>
    </style:style>
    <style:style style:name="Tabelle1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elle1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le1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elle1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le1.A7" style:family="table-cell">
      <style:table-cell-properties style:vertical-align="middle" fo:padding="0.049cm" fo:border-left="0.75pt solid #808080" fo:border-right="0.75pt solid #808080" fo:border-top="none" fo:border-bottom="0.75pt solid #808080"/>
    </style:style>
    <style:style style:name="Tabelle1.B7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elle2" style:family="table">
      <style:table-properties style:width="13.594cm" table:align="left"/>
    </style:style>
    <style:style style:name="Tabelle2.A" style:family="table-column">
      <style:table-column-properties style:column-width="1.302cm"/>
    </style:style>
    <style:style style:name="Tabelle2.B" style:family="table-column">
      <style:table-column-properties style:column-width="12.293cm"/>
    </style:style>
    <style:style style:name="Tabelle2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elle2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le2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elle2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le2.A5" style:family="table-cell">
      <style:table-cell-properties style:vertical-align="middle" fo:padding="0.049cm" fo:border-left="0.75pt solid #808080" fo:border-right="0.75pt solid #808080" fo:border-top="none" fo:border-bottom="0.75pt solid #808080"/>
    </style:style>
    <style:style style:name="Tabelle2.B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Fließtext.lead">
      <style:text-properties fo:font-weight="bold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able_20_Heading">
      <style:paragraph-properties fo:margin-left="0cm" fo:margin-right="0cm" fo:text-indent="0cm" style:auto-text-indent="false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T1" style:family="text">
      <style:text-properties fo:font-weight="bold"/>
    </style:style>
    <style:style style:name="T2" style:family="text">
      <style:text-properties loext:padding-left="0cm" loext:padding-right="0cm" loext:padding-top="0cm" loext:padding-bottom="0.049cm" loext:border-left="none" loext:border-right="none" loext:border-top="none" loext:border-bottom="0.06pt solid #444444"/>
    </style:style>
    <style:style style:name="T3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treuer-Ablaufplan (Spickzettel)</text:p>
      <text:p text:style-name="P2">2 Gruppen (A/B), 7.–9. Klasse · täglich 9:00–12:00 · Mix GPS + Karte/Hinweis</text:p>
      <text:h text:style-name="Heading_20_2" text:outline-level="2">Rollen</text:h>
      <text:list text:style-name="L1">
        <text:list-item>
          <text:p text:style-name="P3"><text:span text:style-name="T1">Betreuer Gruppe A</text:span> — begleitet A, hält Steckbriefe A </text:p>
        </text:list-item>
        <text:list-item>
          <text:p text:style-name="P3"><text:span text:style-name="T1">Betreuer Gruppe B</text:span> — begleitet B, hält Steckbriefe B </text:p>
        </text:list-item>
        <text:list-item>
          <text:p text:style-name="P4"><text:span text:style-name="T1">Springer/Leitung</text:span> — Material, Erste Hilfe, Zeit, Foto, Notfallkontakt, Schlechtwetter-Entscheidung </text:p>
        </text:list-item>
      </text:list>
      <text:h text:style-name="Heading_20_2" text:outline-level="2">Tag 1 — Erstellen &amp; Ausbringen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">Zeit</text:p>
          </table:table-cell>
          <table:table-cell table:style-name="Tabelle1.B1" office:value-type="string">
            <text:p text:style-name="Table_20_Heading">Wer macht was</text:p>
          </table:table-cell>
        </table:table-row>
        <table:table-row>
          <table:table-cell table:style-name="Tabelle1.A2" office:value-type="string">
            <text:p text:style-name="Table_20_Contents">9:00</text:p>
          </table:table-cell>
          <table:table-cell table:style-name="Tabelle1.B2" office:value-type="string">
            <text:p text:style-name="Table_20_Contents">Begrüßung, Regeln (Müll mit, unauffällig „muggeln", Sicherheit), App-Test-Cache zeigen</text:p>
          </table:table-cell>
        </table:table-row>
        <table:table-row>
          <table:table-cell table:style-name="Tabelle1.A2" office:value-type="string">
            <text:p text:style-name="Table_20_Contents">9:30</text:p>
          </table:table-cell>
          <table:table-cell table:style-name="Tabelle1.B2" office:value-type="string">
            <text:p text:style-name="Table_20_Contents">Gruppen + Bereiche zuweisen, Material ausgeben</text:p>
          </table:table-cell>
        </table:table-row>
        <table:table-row>
          <table:table-cell table:style-name="Tabelle1.A2" office:value-type="string">
            <text:p text:style-name="Table_20_Contents">10:00</text:p>
          </table:table-cell>
          <table:table-cell table:style-name="Tabelle1.B2" office:value-type="string">
            <text:p text:style-name="Table_20_Contents">Caches befüllen + Steckbrief ausfüllen (Koordinaten <text:span text:style-name="T1">und</text:span> Hinweis!)</text:p>
          </table:table-cell>
        </table:table-row>
        <table:table-row>
          <table:table-cell table:style-name="Tabelle1.A2" office:value-type="string">
            <text:p text:style-name="Table_20_Contents">11:00</text:p>
          </table:table-cell>
          <table:table-cell table:style-name="Tabelle1.B2" office:value-type="string">
            <text:p text:style-name="Table_20_Contents">Verstecken im eigenen Bereich; Betreuer prüft jedes Versteck</text:p>
          </table:table-cell>
        </table:table-row>
        <table:table-row>
          <table:table-cell table:style-name="Tabelle1.A2" office:value-type="string">
            <text:p text:style-name="Table_20_Contents">11:45</text:p>
          </table:table-cell>
          <table:table-cell table:style-name="Tabelle1.B2" office:value-type="string">
            <text:p text:style-name="Table_20_Contents">Steckbriefe einsammeln &amp; sicher verwahren (für Tausch Tag 2)</text:p>
          </table:table-cell>
        </table:table-row>
        <table:table-row>
          <table:table-cell table:style-name="Tabelle1.A7" office:value-type="string">
            <text:p text:style-name="Table_20_Contents">12:00</text:p>
          </table:table-cell>
          <table:table-cell table:style-name="Tabelle1.B7" office:value-type="string">
            <text:p text:style-name="Table_20_Contents">Ende, Material zurück</text:p>
          </table:table-cell>
        </table:table-row>
      </table:table>
      <text:p text:style-name="Text_20_body">✅ <text:span text:style-name="T1">Vor Schluss prüfen:</text:span> Jeder Cache auffindbar &amp; sicher? Koordinaten lesbar? Steckbriefe vollständig?</text:p>
      <text:h text:style-name="Heading_20_2" text:outline-level="2">Tag 2 — Tausch &amp; Suchen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Zeit</text:p>
          </table:table-cell>
          <table:table-cell table:style-name="Tabelle2.B1" office:value-type="string">
            <text:p text:style-name="Table_20_Heading">Wer macht was</text:p>
          </table:table-cell>
        </table:table-row>
        <table:table-row>
          <table:table-cell table:style-name="Tabelle2.A2" office:value-type="string">
            <text:p text:style-name="Table_20_Contents">9:00</text:p>
          </table:table-cell>
          <table:table-cell table:style-name="Tabelle2.B2" office:value-type="string">
            <text:p text:style-name="Table_20_Contents">Briefing + <text:span text:style-name="T1">Tausch</text:span>: A bekommt B's Hinweise, B bekommt A's</text:p>
          </table:table-cell>
        </table:table-row>
        <table:table-row>
          <table:table-cell table:style-name="Tabelle2.A2" office:value-type="string">
            <text:p text:style-name="Table_20_Contents">9:15</text:p>
          </table:table-cell>
          <table:table-cell table:style-name="Tabelle2.B2" office:value-type="string">
            <text:p text:style-name="Table_20_Contents">Suchen (Betreuer begleiten, Tipps gestaffelt geben)</text:p>
          </table:table-cell>
        </table:table-row>
        <table:table-row>
          <table:table-cell table:style-name="Tabelle2.A2" office:value-type="string">
            <text:p text:style-name="Table_20_Contents">11:15</text:p>
          </table:table-cell>
          <table:table-cell table:style-name="Tabelle2.B2" office:value-type="string">
            <text:p text:style-name="Table_20_Contents">Restliche Caches einsammeln, Tausch/Logbuch abschließen</text:p>
          </table:table-cell>
        </table:table-row>
        <table:table-row>
          <table:table-cell table:style-name="Tabelle2.A5" office:value-type="string">
            <text:p text:style-name="Table_20_Contents">11:45</text:p>
          </table:table-cell>
          <table:table-cell table:style-name="Tabelle2.B5" office:value-type="string">
            <text:p text:style-name="Table_20_Contents">Auswertung, Wertung, Müll mit, Material zurück</text:p>
          </table:table-cell>
        </table:table-row>
      </table:table>
      <text:h text:style-name="Heading_20_2" text:outline-level="2">Tipp-Stufen (nicht zu früh geben!)</text:h>
      <text:list text:style-name="L2">
        <text:list-item>
          <text:p text:style-name="P6">„Lest den Hinweis nochmal genau." </text:p>
        </text:list-item>
        <text:list-item>
          <text:p text:style-name="P6">„Schaut auf Karte/GPS — Umkreis ca. 5–10 m." </text:p>
        </text:list-item>
        <text:list-item>
          <text:p text:style-name="P6">„Auf welcher Höhe? Boden, Augenhöhe, oben?" </text:p>
        </text:list-item>
        <text:list-item>
          <text:p text:style-name="P6">Richtung zeigen / Bereich eingrenzen. </text:p>
        </text:list-item>
        <text:list-item>
          <text:p text:style-name="P7">Versteck-Art verraten (z. B. „magnetisch", „unter etwas"). </text:p>
        </text:list-item>
      </text:list>
      <text:h text:style-name="Heading_20_2" text:outline-level="2">Sicherheit &amp; Notfall</text:h>
      <text:list text:style-name="L3">
        <text:list-item>
          <text:p text:style-name="P8">Erste-Hilfe-Set bei: <text:span text:style-name="T2"> </text:span> (Springer) </text:p>
        </text:list-item>
        <text:list-item>
          <text:p text:style-name="P8">Sammelpunkt: <text:span text:style-name="T2"> </text:span> </text:p>
        </text:list-item>
        <text:list-item>
          <text:p text:style-name="P8">Notfallnummern / Leitung: <text:span text:style-name="T2"> </text:span> </text:p>
        </text:list-item>
        <text:list-item>
          <text:p text:style-name="P9">Regel: Gruppe bleibt zusammen, keine Straßen/Gefahrenstellen, Handy geladen. </text:p>
        </text:list-item>
      </text:list>
      <text:h text:style-name="Heading_20_2" text:outline-level="2">Schlechtwetter-Umschaltung</text:h>
      <text:list text:style-name="L4">
        <text:list-item>
          <text:p text:style-name="P10">Entscheidung morgens durch Leitung. </text:p>
        </text:list-item>
        <text:list-item>
          <text:p text:style-name="P10">Plan B: <text:span text:style-name="T3">Regenplan-Stationen</text:span> (Indoor-Rätsel/QR-Rallye) + <text:span text:style-name="T3">Raetsel-Vordrucke</text:span>. </text:p>
        </text:list-item>
        <text:list-item>
          <text:p text:style-name="P11">Indoor-Material griffbereit: QR-Codes, Hinweiszettel, Zahlenschloss + Box, Umschläge. </text:p>
        </text:list-item>
      </text:list>
      <text:h text:style-name="Heading_20_2" text:outline-level="2">Material-Mitnahme-Check (täglich)</text:h>
      <text:p text:style-name="Text_20_body">☐ Steckbriefe / Stifte / Klemmbretter   ☐ Behälter + Logbücher + Tauschsachen   ☐ Karten ausgedruckt   ☐ Powerbanks   ☐ Erste-Hilfe   ☐ Müllbeutel   ☐ Wasser/Verpflegu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de" fo:country="D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40%"/>
      <style:text-properties fo:color="#222222" loext:opacity="100%" style:font-name="DejaVu Sans" fo:font-family="'DejaVu Sans', Arial, sans-serif" fo:font-size="11pt" style:font-name-asian="DejaVu Sans" style:font-family-asian="'DejaVu Sans', Arial, sans-serif" style:font-size-asian="11pt" style:font-name-complex="DejaVu Sans" style:font-family-complex="'DejaVu Sans', 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left" style:justify-single-word="false"/>
    </style:style>
    <style:style style:name="Heading_20_1" style:display-name="Heading 1" style:family="paragraph" style:parent-style-name="Heading" style:next-style-name="Text_20_body" style:class="chapter">
      <style:paragraph-properties fo:margin-top="0.423cm" fo:margin-bottom="0.141cm" style:contextual-spacing="false" fo:padding-left="0cm" fo:padding-right="0cm" fo:padding-top="0cm" fo:padding-bottom="0.141cm" fo:border-left="none" fo:border-right="none" fo:border-top="none" fo:border-bottom="1.5pt solid #2e7d32"/>
      <style:text-properties fo:color="#1b5e20" loext:opacity="100%" fo:font-size="19pt" fo:font-weight="bold" style:font-size-asian="19pt" style:font-weight-asian="bold" style:font-size-complex="1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.564cm" fo:margin-right="0.564cm" fo:margin-top="0.564cm" fo:margin-bottom="0.141cm" style:contextual-spacing="false"/>
      <style:text-properties fo:color="#2e7d32" loext:opacity="100%"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ließtext.lead" style:family="paragraph" style:parent-style-name="Text_20_body">
      <style:text-properties fo:color="#555555" loext:opacity="100%"/>
    </style:style>
    <style:style style:name="Table_20_Heading" style:display-name="Table Heading" style:family="paragraph" style:parent-style-name="Table_20_Contents" style:class="extra">
      <style:paragraph-properties fo:text-align="left" style:justify-single-word="false" text:number-lines="false" text:line-number="0"/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6cm" fo:margin-bottom="1.6cm" fo:margin-left="1.6cm" fo:margin-right="1.6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Betreuer-Ablaufplan</dc:title>
    <meta:document-statistic meta:table-count="2" meta:image-count="0" meta:object-count="0" meta:page-count="1" meta:paragraph-count="50" meta:word-count="266" meta:character-count="1968" meta:non-whitespace-character-count="1731"/>
    <meta:generator>LibreOffice/26.2.4.2$Linux_X86_64 LibreOffice_project/df4f15f06f7b375c1d16aa35fba92d50b262cd01</meta:generator>
    <meta:user-defined meta:name=""/>
  </office:meta>
</office:document-meta>
</file>