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n &amp; Anregungen zur Geocaching-Aktion</text:p>
      <text:p text:style-name="Fließtext.lead">Sammlung zum Auswählen — nicht alles muss benutzt werden. Passend zur 7.–9. Klasse, 2 Gruppen.</text:p>
      <text:h text:style-name="Heading_20_2" text:outline-level="2">Versteck-Ideen (Outdoor)</text:h>
      <text:list text:style-name="L1">
        <text:list-item>
          <text:p text:style-name="P2">Magnet-Cache an Metallgeländer, Schild-Rückseite, Zaunpfosten </text:p>
        </text:list-item>
        <text:list-item>
          <text:p text:style-name="P2">Filmdose in Astgabel / Baumloch (Augenhöhe = leichter, oben = schwerer) </text:p>
        </text:list-item>
        <text:list-item>
          <text:p text:style-name="P2">Unter losen Steinen / in Mauerritzen / unter Bank </text:p>
        </text:list-item>
        <text:list-item>
          <text:p text:style-name="P2">„Fake"-Versteck: Dose mit Rinde/Moos beklebt (Tarnung) </text:p>
        </text:list-item>
        <text:list-item>
          <text:p text:style-name="P3">Hängend an Schnur in Hecke / Busch · in hohlem Baumstumpf </text:p>
        </text:list-item>
      </text:list>
      <text:p text:style-name="Quotations">Schwierigkeit über <text:span text:style-name="T1">Tarnung + Höhe + Hinweis-Genauigkeit</text:span> steuern, nicht über gefährliche Orte.</text:p>
      <text:h text:style-name="Heading_20_2" text:outline-level="2">Cache-Themen (mehr Spannung)</text:h>
      <text:list text:style-name="L2">
        <text:list-item>
          <text:p text:style-name="P4"><text:span text:style-name="T1">Buchstaben-Cache:</text:span> jeder Cache enthält 1 Buchstaben → Lösungswort am Ende </text:p>
        </text:list-item>
        <text:list-item>
          <text:p text:style-name="P4"><text:span text:style-name="T1">Foto-Cache:</text:span> statt Koordinaten ein Foto vom Versteck-Umfeld </text:p>
        </text:list-item>
        <text:list-item>
          <text:p text:style-name="P4"><text:span text:style-name="T1">Multi-Cache:</text:span> Cache 1 nennt Koordinaten/Hinweis für Cache 2 </text:p>
        </text:list-item>
        <text:list-item>
          <text:p text:style-name="P5"><text:span text:style-name="T1">Quiz-Cache:</text:span> Frage im Cache; Antwort = Hinweis zum nächsten </text:p>
        </text:list-item>
      </text:list>
      <text:h text:style-name="Heading_20_2" text:outline-level="2">Rätsel-Ideen (Baukasten — Lösung in Klammern)</text:h>
      <text:list text:style-name="L3">
        <text:list-item>
          <text:p text:style-name="P6">Anagramm: „HCSTAZ" (SCHATZ) · Zahlenreihe: 2,4,8,16,… (32) </text:p>
        </text:list-item>
        <text:list-item>
          <text:p text:style-name="P6">Buchstaben = Zahlen (A=1…): „6-12-21-18" (FLUR) · Caesar-Code (+1) </text:p>
        </text:list-item>
        <text:list-item>
          <text:p text:style-name="P6">Rätselfrage: „Blätter, aber kein Baum" (Buch) · Quersumme/Mathe </text:p>
        </text:list-item>
        <text:list-item>
          <text:p text:style-name="P7">Spiegelschrift / Geheimschrift · Bilderrätsel (Symbol = Ort) </text:p>
        </text:list-item>
      </text:list>
      <text:p text:style-name="Quotations">Leere Vordrucke dazu: <text:span text:style-name="T2">Raetsel-Vordrucke</text:span>.</text:p>
      <text:h text:style-name="Heading_20_2" text:outline-level="2">Tauschgegenstände</text:h>
      <text:p text:style-name="Text_20_body">Kleinspielzeug, Sticker, Anstecker/Buttons, Murmeln, Sammelkarten, Schlüsselanhänger, selbstgemachte „Geocoins" aus Pappe. Regel: <text:span text:style-name="T1">gleichwertig tauschen</text:span> oder nur eintragen.</text:p>
      <text:h text:style-name="Heading_20_2" text:outline-level="2">Wertungs-Ideen (optional)</text:h>
      <text:list text:style-name="L4">
        <text:list-item>
          <text:p text:style-name="P8">Punkt pro Fund · Bonus für schnellsten Fund (FTF) · Kreativ-Punkt fürs beste Versteck </text:p>
        </text:list-item>
        <text:list-item>
          <text:p text:style-name="P9">Team-Punkt: alle Caches gefunden = Extrapunkte · Mini-Urkunde/kleiner Preis fürs Siegerteam </text:p>
        </text:list-item>
      </text:list>
      <text:h text:style-name="Heading_20_2" text:outline-level="2">Spiele-Auswahl für Pausen &amp; Regenplan</text:h>
      <text:p text:style-name="Text_20_body">Aus dem Ordner <text:span text:style-name="Source_20_Text">Spiele/</text:span> (PDF-Beschreibungen). <text:span text:style-name="T1">Grobe Einordnung nach Titel — vor Einsatz kurz in die PDF schauen.</text:span></text:p>
      <text:h text:style-name="Heading_20_3" text:outline-level="3">Kennenlernen / Auflockerung</text:h>
      <text:list text:style-name="L5">
        <text:list-item>
          <text:p text:style-name="P10">Namensball · Alphabetischer Kreis · Gleiche Merkmale finden</text:p>
        </text:list-item>
      </text:list>
      <text:h text:style-name="Heading_20_3" text:outline-level="3">Kooperation / Team (Gruppenbildung)</text:h>
      <text:list text:style-name="L6">
        <text:list-item>
          <text:p text:style-name="P11">Gordischer Knoten · Menschenkette/Flussüberquerung · fliegender Teppich · Bretterlauf der Wanderer · Stoßdämpfer · Drunter und drüber / heißer Draht · blind bis 20 zählen · Hoch hinaus · Menschen, Hände, Füße</text:p>
        </text:list-item>
      </text:list>
      <text:h text:style-name="Heading_20_3" text:outline-level="3">Vertrauen</text:h>
      <text:list text:style-name="L7">
        <text:list-item>
          <text:p text:style-name="P12">Vertrauensfall · Standhalten · Händegasse</text:p>
        </text:list-item>
      </text:list>
      <text:h text:style-name="Heading_20_3" text:outline-level="3">Action / Gelände / Fangen</text:h>
      <text:list text:style-name="L8">
        <text:list-item>
          <text:p text:style-name="P13">Tatonka · Alaska Baseball · Zyklopen-Fangen · Geier-Hase-Kohlkopf · Krebskampf · ab durch die Mitte · Die wilde Acht · Bodyguard · Ausbrechen</text:p>
        </text:list-item>
      </text:list>
      <text:h text:style-name="Heading_20_3" text:outline-level="3">Gelände / Abenteuer (nah am Geocaching)</text:h>
      <text:list text:style-name="L9">
        <text:list-item>
          <text:p text:style-name="P14">Kompass · Schatz im Säureteich / Nebel von Avalon · Das Sternentor · Almwanderung bei Nacht · Der Felsen oder der Haufen</text:p>
        </text:list-item>
      </text:list>
      <text:h text:style-name="Heading_20_3" text:outline-level="3">Indoor / Sonstiges (gut bei Regen)</text:h>
      <text:list text:style-name="L10">
        <text:list-item>
          <text:p text:style-name="P15">Deckenspiel (hinter der Decke) · Knecht Rupprecht</text:p>
        </text:list-item>
      </text:list>
      <text:p text:style-name="Quotations"><text:span text:style-name="T1">Empfehlung Regen:</text:span> 2–3 Kooperationsspiele + 1 Vertrauensspiel + die Indoor-Rätsel-Rallye (<text:span text:style-name="T2">Regenplan-Stationen</text:span>) ergeben ein rundes Indoor-Program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/>
      <style:text-properties fo:color="#222222" loext:opacity="100%" style:font-name="DejaVu Sans" fo:font-family="'DejaVu Sans', Arial, sans-serif" fo:font-size="11pt" style:font-name-asian="DejaVu Sans" style:font-family-asian="'DejaVu Sans', Arial, sans-serif" style:font-size-asian="11pt" style:font-name-complex="DejaVu Sans" style:font-family-complex="'DejaVu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paragraph-properties fo:margin-top="0.423cm" fo:margin-bottom="0.141cm" style:contextual-spacing="false" fo:padding-left="0cm" fo:padding-right="0cm" fo:padding-top="0cm" fo:padding-bottom="0.141cm" fo:border-left="none" fo:border-right="none" fo:border-top="none" fo:border-bottom="1.5pt solid #2e7d32"/>
      <style:text-properties fo:color="#1b5e20" loext:opacity="100%" fo:font-size="19pt" fo:font-weight="bold" style:font-size-asian="19pt" style:font-weight-asian="bold" style:font-size-complex="1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494cm" fo:margin-right="0.494cm" fo:margin-top="0.494cm" fo:margin-bottom="0.141cm" style:contextual-spacing="false"/>
      <style:text-properties fo:color="#2e7d32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.282cm" fo:margin-right="0.282cm" fo:margin-top="0.282cm" fo:margin-bottom="0.071cm" style:contextual-spacing="false"/>
      <style:text-properties fo:color="#33691e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282cm" fo:margin-right="0.282cm" fo:margin-top="0.282cm" fo:margin-bottom="0.282cm" style:contextual-spacing="false" fo:text-indent="0cm" style:auto-text-indent="false" fo:padding-left="0.353cm" fo:padding-right="0cm" fo:padding-top="0cm" fo:padding-bottom="0cm" fo:border-left="2.24pt solid #c8e6c9" fo:border-right="none" fo:border-top="none" fo:border-bottom="none"/>
      <style:text-properties fo:color="#444444" loext:opacity="100%"/>
    </style:style>
    <style:style style:name="Fließtext.lead" style:family="paragraph" style:parent-style-name="Text_20_body">
      <style:text-properties fo:color="#555555" loext:opacity="100%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deen &amp; Anregungen</dc:title>
    <meta:document-statistic meta:table-count="0" meta:image-count="0" meta:object-count="0" meta:page-count="1" meta:paragraph-count="40" meta:word-count="378" meta:character-count="2654" meta:non-whitespace-character-count="2321"/>
    <meta:generator>LibreOffice/26.2.4.2$Linux_X86_64 LibreOffice_project/df4f15f06f7b375c1d16aa35fba92d50b262cd01</meta:generator>
    <meta:user-defined meta:name=""/>
  </office:meta>
</office:document-meta>
</file>