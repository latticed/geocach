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left="0.282cm" fo:margin-right="0.282cm" fo:margin-top="0.282cm" fo:margin-bottom="0.282cm" style:contextual-spacing="false" fo:keep-together="always" fo:text-indent="0cm" style:auto-text-indent="false"/>
      <style:text-properties fo:background-color="#fafafa" loext:padding-left="0.353cm" loext:padding-right="0cm" loext:padding-top="0.282cm" loext:padding-bottom="0.282cm" loext:border-left="0.06pt solid #bbbbbb" loext:border-right="none" loext:border-top="0.06pt solid #bbbbbb" loext:border-bottom="0.06pt solid #bbbbbb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fo:color="#1b5e20" loext:opacity="100%" fo:font-weight="bold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enplan — Indoor-Rätsel-/QR-Rallye (Hausspiel)</text:p>
      <text:p text:style-name="Fließtext.lead">Ersatz bei schlechtem Wetter. Gleiches Tausch-Prinzip: <text:span text:style-name="T1">Gruppe A legt für B und umgekehrt</text:span>. Statt GPS führt jede Station per Rätsel oder QR-Code zur nächsten.</text:p>
      <text:list text:style-name="L1">
        <text:list-item>
          <text:p text:style-name="P2"><text:span text:style-name="T1">Dauer:</text:span> ca. 60–90 Min · <text:span text:style-name="T1">6–8 Stationen</text:span> je Kette </text:p>
        </text:list-item>
        <text:list-item>
          <text:p text:style-name="P2"><text:span text:style-name="T1">Prinzip:</text:span> Lösung einer Station = Ort/Hinweis der nächsten </text:p>
        </text:list-item>
        <text:list-item>
          <text:p text:style-name="P2"><text:span text:style-name="T1">Mix:</text:span> QR-Codes (Handy) + Papier-Hinweise (ohne Handy lösbar) </text:p>
        </text:list-item>
        <text:list-item>
          <text:p text:style-name="P3"><text:span text:style-name="T1">Finale:</text:span> Aus Teil-Lösungen ergibt sich ein <text:span text:style-name="T1">Zahlencode</text:span> für eine abgeschlossene Schatzkiste </text:p>
        </text:list-item>
      </text:list>
      <text:h text:style-name="Heading_20_2" text:outline-level="2">Aufbau-Idee (Stationen-Kette)</text:h>
      <text:p text:style-name="Quotations">Orte sind Beispiele — an euer Gebäude anpassen. Jede Station gibt eine <text:span text:style-name="T1">Ziffer</text:span> für den Schluss-Code.</text:p>
      <text:p text:style-name="P4"><text:span text:style-name="T1">Station 1 — Start (Eingang/Klassenzimmer)</text:span><text:line-break/>Aufgabe: Anagramm „HCSTAZ" → ? · Lösung: <text:span text:style-name="T1">SCHATZ</text:span> · Code-Ziffer: <text:span text:style-name="T2">4</text:span><text:line-break/>Führt zu: „Dort, wo Bücher wohnen." → Bibliothek/Leseecke</text:p>
      <text:p text:style-name="P4"><text:span text:style-name="T1">Station 2 — Bibliothek/Leseecke</text:span><text:line-break/>Aufgabe: QR scannen → „Ich habe Blätter, bin aber kein Baum. Was bin ich?" · Lösung: <text:span text:style-name="T1">Buch</text:span> (Hinweis im 3. Regal) · Code-Ziffer: <text:span text:style-name="T2">7</text:span><text:line-break/>Führt zu: „Wo man Hunger stillt." → Mensa/Küche</text:p>
      <text:p text:style-name="P4"><text:span text:style-name="T1">Station 3 — Mensa/Küche</text:span><text:line-break/>Aufgabe: Zahlenrätsel „2, 4, 8, 16, __?" · Lösung: <text:span text:style-name="T1">32</text:span> (Hinweis unter Tisch 3) · Code-Ziffer: <text:span text:style-name="T2">2</text:span><text:line-break/>Führt zu: „Wo es laut werden darf." → Sporthalle/Aula</text:p>
      <text:p text:style-name="P4"><text:span text:style-name="T1">Station 4 — Sporthalle/Aula</text:span><text:line-break/>Aufgabe: 10 Hampelmänner, dann Umschlag öffnen · Lösung: Buchstaben-Puzzle „GANG" · Code-Ziffer: <text:span text:style-name="T2">9</text:span><text:line-break/>Führt zu: „Der lange Weg mit vielen Türen." → Flur/Gang</text:p>
      <text:p text:style-name="P4"><text:span text:style-name="T1">Station 5 — Flur/Gang</text:span><text:line-break/>Aufgabe: QR → Geheimschrift (A=1…): „6-12-21-18" · Lösung: <text:span text:style-name="T1">FLUR</text:span> (Hinweis an Pinnwand) · Code-Ziffer: <text:span text:style-name="T2">1</text:span><text:line-break/>Führt zu: „Wo Wissen an der Wand hängt." → Fach-/Computerraum</text:p>
      <text:p text:style-name="P4"><text:span text:style-name="T1">Station 6 — Fach-/Computerraum</text:span><text:line-break/>Aufgabe: Logik-/Suchaufgabe · Lösung: Hinweis unter der Tastatur am Fenster · Code-Ziffer: <text:span text:style-name="T2">5</text:span><text:line-break/>Führt zu: Finale „Wo alles begann." → zurück zum Start</text:p>
      <text:p text:style-name="P4"><text:span text:style-name="T1">Station 7 — Finale (Start/Lehrerpult)</text:span><text:line-break/>Alle Code-Ziffern in Reihenfolge eingeben · <text:span text:style-name="T1">Schluss-Code: 4 – 7 – 2 – 9 – 1 – 5</text:span> (anpassen) → Zahlenschloss öffnet die Schatzkiste.</text:p>
      <text:h text:style-name="Heading_20_2" text:outline-level="2">Material (zusätzlich)</text:h>
      <text:list text:style-name="L2">
        <text:list-item>
          <text:p text:style-name="P5">Ausgedruckte Hinweiszettel &amp; Rätselkarten (siehe <text:span text:style-name="T3">Raetsel-Vordrucke</text:span>) </text:p>
        </text:list-item>
        <text:list-item>
          <text:p text:style-name="P5">Ausgedruckte QR-Codes (laminiert/klebbar) · Umschläge · Klebepunkte </text:p>
        </text:list-item>
        <text:list-item>
          <text:p text:style-name="P6">1 Zahlenschloss + abschließbare Box · Stifte · kleine Preise </text:p>
        </text:list-item>
      </text:list>
      <text:h text:style-name="Heading_20_2" text:outline-level="2">QR-Codes erstellen (schnell)</text:h>
      <text:list text:style-name="L3">
        <text:list-item>
          <text:p text:style-name="P7">Hinweistext/Rätsel schreiben. </text:p>
        </text:list-item>
        <text:list-item>
          <text:p text:style-name="P7">Auf einer kostenlosen QR-Website Typ „Text" wählen, Hinweis einfügen. </text:p>
        </text:list-item>
        <text:list-item>
          <text:p text:style-name="P8">QR herunterladen, ausdrucken, an der Station befestigen. (Text-QR funktioniert offline.) </text:p>
        </text:list-item>
      </text:list>
      <text:h text:style-name="Heading_20_2" text:outline-level="2">Anpassen für 2 Gruppen</text:h>
      <text:list text:style-name="L4">
        <text:list-item>
          <text:p text:style-name="P9"><text:span text:style-name="T1">Tausch:</text:span> Kette A in Etage 1, Kette B in Etage 2 → am Ende getauscht. </text:p>
        </text:list-item>
        <text:list-item>
          <text:p text:style-name="P10"><text:span text:style-name="T1">Wettlauf:</text:span> beide laufen dieselbe Kette zeitversetzt (5–10 Min) → schnellste Gruppe gewinnt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de" fo:country="D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/>
      <style:text-properties fo:color="#222222" loext:opacity="100%" style:font-name="DejaVu Sans" fo:font-family="'DejaVu Sans', Arial, sans-serif" fo:font-size="11pt" style:font-name-asian="DejaVu Sans" style:font-family-asian="'DejaVu Sans', Arial, sans-serif" style:font-size-asian="11pt" style:font-name-complex="DejaVu Sans" style:font-family-complex="'DejaVu Sans'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left" style:justify-single-word="false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141cm" style:contextual-spacing="false" fo:padding-left="0cm" fo:padding-right="0cm" fo:padding-top="0cm" fo:padding-bottom="0.141cm" fo:border-left="none" fo:border-right="none" fo:border-top="none" fo:border-bottom="1.5pt solid #2e7d32"/>
      <style:text-properties fo:color="#1b5e20" loext:opacity="100%" fo:font-size="19pt" fo:font-weight="bold" style:font-size-asian="19pt" style:font-weight-asian="bold" style:font-size-complex="1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.564cm" fo:margin-right="0.564cm" fo:margin-top="0.564cm" fo:margin-bottom="0.141cm" style:contextual-spacing="false"/>
      <style:text-properties fo:color="#2e7d32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.423cm" fo:margin-right="0.423cm" fo:margin-top="0.423cm" fo:margin-bottom="0.106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282cm" fo:margin-right="0.282cm" fo:margin-top="0.282cm" fo:margin-bottom="0.282cm" style:contextual-spacing="false" fo:text-indent="0cm" style:auto-text-indent="false" fo:padding-left="0.353cm" fo:padding-right="0cm" fo:padding-top="0cm" fo:padding-bottom="0cm" fo:border-left="2.24pt solid #c8e6c9" fo:border-right="none" fo:border-top="none" fo:border-bottom="none"/>
      <style:text-properties fo:color="#444444" loext:opacity="100%"/>
    </style:style>
    <style:style style:name="Fließtext.lead" style:family="paragraph" style:parent-style-name="Text_20_body">
      <style:text-properties fo:color="#555555" loext:opacity="100%"/>
    </style:style>
    <style:style style:name="Table_20_Heading" style:display-name="Table Heading" style:family="paragraph" style:parent-style-name="Table_20_Contents" style:class="extra">
      <style:paragraph-properties fo:text-align="left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genplan – Stationen</dc:title>
    <meta:document-statistic meta:table-count="0" meta:image-count="0" meta:object-count="0" meta:page-count="1" meta:paragraph-count="26" meta:word-count="365" meta:character-count="2473" meta:non-whitespace-character-count="2123"/>
    <meta:generator>LibreOffice/26.2.4.2$Linux_X86_64 LibreOffice_project/df4f15f06f7b375c1d16aa35fba92d50b262cd01</meta:generator>
    <meta:user-defined meta:name=""/>
  </office:meta>
</office:document-meta>
</file>