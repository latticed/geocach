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3.614cm" table:align="left"/>
    </style:style>
    <style:style style:name="Tabelle1.A" style:family="table-column">
      <style:table-column-properties style:column-width="4.715cm"/>
    </style:style>
    <style:style style:name="Tabelle1.B" style:family="table-column">
      <style:table-column-properties style:column-width="8.899cm"/>
    </style:style>
    <style:style style:name="Tabelle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1.A4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1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le2" style:family="table">
      <style:table-properties style:width="13.614cm" table:align="left"/>
    </style:style>
    <style:style style:name="Tabelle2.A" style:family="table-column">
      <style:table-column-properties style:column-width="4.715cm"/>
    </style:style>
    <style:style style:name="Tabelle2.B" style:family="table-column">
      <style:table-column-properties style:column-width="8.899cm"/>
    </style:style>
    <style:style style:name="Tabelle2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2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2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2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2.A4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2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le3" style:family="table">
      <style:table-properties style:width="8.775cm" table:align="left"/>
    </style:style>
    <style:style style:name="Tabelle3.A" style:family="table-column">
      <style:table-column-properties style:column-width="4.387cm"/>
    </style:style>
    <style:style style:name="Tabelle3.B" style:family="table-column">
      <style:table-column-properties style:column-width="4.389cm"/>
    </style:style>
    <style:style style:name="Tabelle3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3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3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3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3.A3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3.B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keep-together="always" fo:text-indent="0cm" style:auto-text-indent="false"/>
      <style:text-properties loext:padding-left="0.353cm" loext:padding-right="0cm" loext:padding-top="0.282cm" loext:padding-bottom="0.282cm" loext:border-left="0.74pt solid #333333" loext:border-right="none" loext:border-top="0.74pt solid #333333" loext:border-bottom="0.74pt solid #333333"/>
    </style:style>
    <style:style style:name="P4" style:family="paragraph" style:parent-style-name="Text_20_body">
      <style:paragraph-properties fo:margin-left="0.212cm" fo:margin-right="0.212cm" fo:margin-top="0.212cm" fo:margin-bottom="0.212cm" style:contextual-spacing="false" fo:keep-together="always" fo:text-indent="0cm" style:auto-text-indent="false"/>
      <style:text-properties loext:padding-left="0.353cm" loext:padding-right="0cm" loext:padding-top="0.282cm" loext:padding-bottom="0.282cm" loext:border-left="0.74pt solid #333333" loext:border-right="none" loext:border-top="0.74pt solid #333333" loext:border-bottom="0.74pt solid #333333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2.117cm" fo:text-align="center" style:justify-single-word="false" fo:text-indent="0cm" style:auto-text-indent="false"/>
      <style:text-properties fo:color="#888888" loext:opacity="100%" fo:font-size="9pt" loext:padding="0.049cm" loext:border="0.06pt dashed #888888"/>
    </style:style>
    <style:style style:name="P8" style:family="paragraph" style:parent-style-name="Text_20_body">
      <style:paragraph-properties fo:margin-left="0cm" fo:margin-right="0cm" fo:margin-top="0.212cm" fo:margin-bottom="0.499cm" style:contextual-spacing="false" fo:text-indent="0cm" style:auto-text-indent="false"/>
      <style:text-properties loext:padding="0.282cm" loext:border="0.06pt solid #aaaaa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.282cm" loext:border="0.06pt solid #aaaaaa"/>
    </style:style>
    <style:style style:name="P10" style:family="paragraph" style:parent-style-name="Fließtext.hint">
      <style:paragraph-properties fo:margin-left="0cm" fo:margin-right="0cm" fo:margin-top="0.282cm" fo:margin-bottom="0.499cm" style:contextual-spacing="false" fo:text-indent="0cm" style:auto-text-indent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ätsel-Vordrucke</text:p>
      <text:p text:style-name="Fließtext.hint">Leere Vorlagen für eigene Rätsel (Outdoor-Hinweise &amp; Indoor-Stationen). Pro Rätsel ein Vordruck ausfüllen, ausschneiden, platzieren. Lösungs-Ziffer nicht vergessen, falls ihr den Schluss-Code nutzt.</text:p>
      <text:h text:style-name="Heading_20_2" text:outline-level="2">1) Hinweis-/Stations-Karte (Blanko)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Station Nr. / Kette</text:p>
          </table:table-cell>
          <table:table-cell table:style-name="Tabelle1.B1" office:value-type="string">
            <text:p text:style-name="Table_20_Contents">Nr. _______    Gruppe: ☐ A   ☐ B</text:p>
          </table:table-cell>
        </table:table-row>
        <table:table-row>
          <table:table-cell table:style-name="Tabelle1.A2" office:value-type="string">
            <text:p text:style-name="Table_20_Contents">Rätsel / Aufgabe</text:p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Table_20_Contents">Lösung</text:p>
          </table:table-cell>
          <table:table-cell table:style-name="Tabelle1.B2" office:value-type="string">
            <text:p text:style-name="Table_20_Contents">________________________    Code-Ziffer: _____</text:p>
          </table:table-cell>
        </table:table-row>
        <table:table-row>
          <table:table-cell table:style-name="Tabelle1.A4" office:value-type="string">
            <text:p text:style-name="Table_20_Contents">Führt zu (nächster Ort)</text:p>
          </table:table-cell>
          <table:table-cell table:style-name="Tabelle1.B4" office:value-type="string">
            <text:p text:style-name="P2"/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Station Nr. / Kette</text:p>
          </table:table-cell>
          <table:table-cell table:style-name="Tabelle2.B1" office:value-type="string">
            <text:p text:style-name="Table_20_Contents">Nr. _______    Gruppe: ☐ A   ☐ B</text:p>
          </table:table-cell>
        </table:table-row>
        <table:table-row>
          <table:table-cell table:style-name="Tabelle2.A2" office:value-type="string">
            <text:p text:style-name="Table_20_Contents">Rätsel / Aufgabe</text:p>
          </table:table-cell>
          <table:table-cell table:style-name="Tabelle2.B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Table_20_Contents">Lösung</text:p>
          </table:table-cell>
          <table:table-cell table:style-name="Tabelle2.B2" office:value-type="string">
            <text:p text:style-name="Table_20_Contents">________________________    Code-Ziffer: _____</text:p>
          </table:table-cell>
        </table:table-row>
        <table:table-row>
          <table:table-cell table:style-name="Tabelle2.A4" office:value-type="string">
            <text:p text:style-name="Table_20_Contents">Führt zu (nächster Ort)</text:p>
          </table:table-cell>
          <table:table-cell table:style-name="Tabelle2.B4" office:value-type="string">
            <text:p text:style-name="P2"/>
          </table:table-cell>
        </table:table-row>
      </table:table>
      <text:h text:style-name="Heading_20_2" text:outline-level="2">2) Schluss-Code-Sammelblatt (für die Suchgruppe)</text:h>
      <text:p text:style-name="P3"><text:span text:style-name="T1">Schatz-Code sammeln</text:span>    Gruppe: ☐ A   ☐ B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Station 1: Ziffer _____</text:p>
          </table:table-cell>
          <table:table-cell table:style-name="Tabelle3.B1" office:value-type="string">
            <text:p text:style-name="Table_20_Contents">Station 4: Ziffer _____</text:p>
          </table:table-cell>
        </table:table-row>
        <table:table-row>
          <table:table-cell table:style-name="Tabelle3.A2" office:value-type="string">
            <text:p text:style-name="Table_20_Contents">Station 2: Ziffer _____</text:p>
          </table:table-cell>
          <table:table-cell table:style-name="Tabelle3.B2" office:value-type="string">
            <text:p text:style-name="Table_20_Contents">Station 5: Ziffer _____</text:p>
          </table:table-cell>
        </table:table-row>
        <table:table-row>
          <table:table-cell table:style-name="Tabelle3.A3" office:value-type="string">
            <text:p text:style-name="Table_20_Contents">Station 3: Ziffer _____</text:p>
          </table:table-cell>
          <table:table-cell table:style-name="Tabelle3.B3" office:value-type="string">
            <text:p text:style-name="Table_20_Contents">Station 6: Ziffer _____</text:p>
          </table:table-cell>
        </table:table-row>
      </table:table>
      <text:p text:style-name="P4">► <text:span text:style-name="T1">Schluss-Code (in Reihenfolge):</text:span> ____ ____ ____ ____ ____ ____</text:p>
      <text:h text:style-name="Heading_20_2" text:outline-level="2">3) Rätsel-Ideen-Baukasten (zum Abschreiben/Anpassen)</text:h>
      <text:list text:style-name="L1">
        <text:list-item>
          <text:p text:style-name="P5">Anagramm: „HCSTAZ" (= SCHATZ) · Zahlenreihe: 2, 4, 8, 16, … (= 32) </text:p>
        </text:list-item>
        <text:list-item>
          <text:p text:style-name="P5">Buchstaben = Zahlen (A=1…): „6-12-21-18" (= FLUR) · Caesar-Code (+1 Buchstabe) </text:p>
        </text:list-item>
        <text:list-item>
          <text:p text:style-name="P5">Rätselfrage: „Blätter, aber kein Baum" (= Buch) · Quersumme / kleine Mathe-Aufgabe </text:p>
        </text:list-item>
        <text:list-item>
          <text:p text:style-name="P6">Spiegelschrift · Such-/Bewegungsaufgabe · Bilderrätsel (Symbol = Ort) </text:p>
        </text:list-item>
      </text:list>
      <text:h text:style-name="Heading_20_2" text:outline-level="2">4) QR-Hinweis-Etikett (Blanko)</text:h>
      <text:p text:style-name="P7">[ QR-Code hier aufkleben ]</text:p>
      <text:p text:style-name="P8">Station: _______</text:p>
      <text:p text:style-name="P9">Backup-Hinweis (Text):<text:line-break/><text:line-break/>______________________________<text:line-break/><text:line-break/>______________________________<text:line-break/><text:line-break/>Lösung-Ziffer: _____</text:p>
      <text:p text:style-name="P10">QR erstellen: Hinweistext in einen QR-Generator (Typ „Text") einfügen, ausdrucken, aufkleben. Reiner Text-QR funktioniert offl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22222" loext:opacity="100%" style:font-name="DejaVu Sans" fo:font-family="'DejaVu Sans', Arial, sans-serif" fo:font-size="11pt" style:font-name-asian="DejaVu Sans" style:font-family-asian="'DejaVu Sans', Arial, sans-serif" style:font-size-asian="11pt" style:font-name-complex="DejaVu Sans" style:font-family-complex="'DejaVu Sans'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paragraph-properties fo:margin-top="0.423cm" fo:margin-bottom="0.071cm" style:contextual-spacing="false"/>
      <style:text-properties fo:color="#1b5e20" loext:opacity="100%" fo:font-size="17pt" fo:font-weight="bold" style:font-size-asian="17pt" style:font-weight-asian="bold" style:font-size-complex="17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494cm" fo:margin-right="0.494cm" fo:margin-top="0.494cm" fo:margin-bottom="0.141cm" style:contextual-spacing="false"/>
      <style:text-properties fo:color="#2e7d32" loext:opacity="100%" style:font-name="Liberation Serif" fo:font-family="'Liberation Serif'" style:font-family-generic="roman" style:font-pitch="variable" fo:font-size="12.5pt" fo:font-weight="bold" style:font-name-asian="Noto Serif CJK SC" style:font-family-asian="'Noto Serif CJK SC'" style:font-family-generic-asian="system" style:font-pitch-asian="variable" style:font-size-asian="12.5pt" style:font-weight-asian="bold" style:font-name-complex="Noto Sans Devanagari1" style:font-family-complex="'Noto Sans Devanagari'" style:font-family-generic-complex="system" style:font-pitch-complex="variable" style:font-size-complex="12.5pt" style:font-weight-complex="bold"/>
    </style:style>
    <style:style style:name="Fließtext.hint" style:family="paragraph" style:parent-style-name="Text_20_body">
      <style:paragraph-properties fo:margin-top="0cm" fo:margin-bottom="0.282cm" style:contextual-spacing="false"/>
      <style:text-properties fo:color="#555555" loext:opacity="100%" fo:font-size="9.5pt" style:font-size-asian="9.5pt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01cm" fo:margin-bottom="1.401cm" fo:margin-left="1.401cm" fo:margin-right="1.4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ätsel-Vordrucke</dc:title>
    <meta:document-statistic meta:table-count="3" meta:image-count="0" meta:object-count="0" meta:page-count="1" meta:paragraph-count="34" meta:word-count="200" meta:character-count="1486" meta:non-whitespace-character-count="1296"/>
    <meta:generator>LibreOffice/26.2.4.2$Linux_X86_64 LibreOffice_project/df4f15f06f7b375c1d16aa35fba92d50b262cd01</meta:generator>
    <meta:user-defined meta:name=""/>
  </office:meta>
</office:document-meta>
</file>